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Tahoma1" svg:font-family="Tahoma"/>
    <style:font-face style:name="Times New Roman1" svg:font-family="'Times New Roman'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" fo:font-size="12pt" style:font-name-asian="Courier New" style:font-size-asian="12pt" style:font-name-complex="Courier New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ie;</text:p>
      <text:p text:style-name="P1"/>
      <text:p text:style-name="P1">Hello there! <text:s/>How are you? <text:s/>Pretty good here, busy though and getting busier. <text:s/>Prague is still the same random madness but you can ride the crazy wave most times.</text:p>
      <text:p text:style-name="P1"/>
      <text:p text:style-name="P1">I heard from PJ you're coming back? <text:s/>Cool. <text:s/>Hope to see you here soon. <text:s/>It's so fucking crazy here, Howie, you can't fucking believe it. <text:s/>But its super fun. <text:s/>I got a new job with a software company here making 55.000kc a month and 70.000kc after 3. <text:s/>Got another software side project I'm working on. <text:s text:c="2"/>People interested in my wireless power work also. <text:s/>And don't get me started about this graduate school story. <text:s/>But doing okay without Kim, I think. <text:s/>Besides, I'm so busy can't spend too much time thinking about it.</text:p>
      <text:p text:style-name="P1"/>
      <text:p text:style-name="P1">Pavel is doing well and his English is about the same. <text:s/>He “found” a black iPod Nano on the street, he says about a week or so ago and we went to the Apple Store in Andel where I reformatted it for him and put his music on it. <text:s/>The tech guy at the store just about fucked the whole thing up. <text:s/>No training I swear! <text:s/>But he's been happier with his iPod since his camera went to shit. <text:s/>I've looked at it 4 times and even got a meter on it and still can't figure out what it is. <text:s/>It's just old I think.</text:p>
      <text:p text:style-name="P1"/>
      <text:p text:style-name="P1">But we're keeping the flat together. <text:s/>Cleaning up after him is a bitch sometimes and I'm trying to train him to do the clean-as-you-go technique instead of leaving shit stacked up around. <text:s/>He's leaning but it's a little slow. <text:s/>He and I hang out occasionally but most times I'm stuck in my room working. <text:s/>We went to the pub a few nights ago for some brewery goulash. <text:s/>It was damn good.</text:p>
      <text:p text:style-name="P1"/>
      <text:p text:style-name="P1">He's excited for your return. <text:s/>He beams whenever he talks about you. <text:s/></text:p>
      <text:p text:style-name="P1"/>
      <text:p text:style-name="P1">Kim is doing well. <text:s/>She got home safe and saw her family. <text:s/>She wanted me to drop you a line and tell you not to worry. <text:s/>She's set up with doctors and Medicaid to pay for it, every treatment covered, anything for the next year. <text:s/>So, no worries for her for a little while. <text:s/>Her doctor said her condition is not as bad as was thought here in Czech Republic. <text:s/>Sigh of relief!</text:p>
      <text:p text:style-name="P1"/>
      <text:p text:style-name="P1">Shit. <text:s/>Just got up and Pavel left a mess in the kitchen. <text:s/>We just cleaned the flat this morning. <text:s/>That little fucker. <text:s/>I'm looking at a new flat on Wednesday afternoon, some nice places for around 12.000kc. <text:s/>You want me to check into some info for you? <text:s/>PJ says in two to three months, but it's Pavel. <text:s/>So, I could help you if you like.</text:p>
      <text:p text:style-name="P1"/>
      <text:p text:style-name="P1">Well, gotta get back to it. <text:s/>Take care of yourself and get yourself back here.</text:p>
      <text:p text:style-name="P1"/>
      <text:p text:style-name="P1">Chr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Tahoma1" svg:font-family="Tahoma"/>
    <style:font-face style:name="Times New Roman1" svg:font-family="'Times New Roman'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2$Win32 OpenOffice.org_project/680m122$Build-8941
  </meta:generator>
    <meta:initial-creator>Christopher A. Tucker</meta:initial-creator>
    <meta:creation-date>2006-02-22T20:48:25</meta:creation-date>
    <dc:creator>Christopher A. Tucker</dc:creator>
    <dc:date>2006-02-26T13:42:25</dc:date>
    <dc:language>en-US</dc:language>
    <meta:editing-cycles>8</meta:editing-cycles>
    <meta:editing-duration>PT3H17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467" meta:character-count="2426"/>
  </office:meta>
</office:document-meta>
</file>